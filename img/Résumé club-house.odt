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b90" officeooo:paragraph-rsid="001dab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ite a l’histoire de ces dix terrains de tennis, la municipalité a décidée d’installer ce club-house près des terrains malgré le fait qu’il ne soit pas totalement fini. Ce club-house s’est fait importer d’Amérique sur le bateau qui transportait 100 passagers et qui a accosté sur le lac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14:26:48.973838400</meta:creation-date>
    <dc:date>2026-06-15T14:31:15.939206500</dc:date>
    <meta:editing-duration>PT4M27S</meta:editing-duration>
    <meta:editing-cycles>1</meta:editing-cycles>
    <meta:document-statistic meta:table-count="0" meta:image-count="0" meta:object-count="0" meta:page-count="1" meta:paragraph-count="1" meta:word-count="48" meta:character-count="288" meta:non-whitespace-character-count="240"/>
    <meta:generator>LibreOffice/25.8.6.2$Windows_X86_64 LibreOffice_project/b4b39682cd9868fa725bc664aff94278d315bd04</meta:generator>
  </office:meta>
</office:document-meta>
</file>