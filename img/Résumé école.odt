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3b4e" officeooo:paragraph-rsid="001d3b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t école ci dessus est très originale car elle a une piscine sur son toit. L’avantage est donc qu’en été , on peut se rafraîchir sans aller au lac. Cette école a aussi une aire de jeu très attractive car elle possède une araignée sur laquelle les enfants peuvent jouer avec sécurité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5T14:31:31.381794900</meta:creation-date>
    <dc:date>2026-06-15T14:46:00.610190400</dc:date>
    <meta:editing-duration>PT14M29S</meta:editing-duration>
    <meta:editing-cycles>1</meta:editing-cycles>
    <meta:document-statistic meta:table-count="0" meta:image-count="0" meta:object-count="0" meta:page-count="1" meta:paragraph-count="1" meta:word-count="52" meta:character-count="284" meta:non-whitespace-character-count="232"/>
    <meta:generator>LibreOffice/25.8.6.2$Windows_X86_64 LibreOffice_project/b4b39682cd9868fa725bc664aff94278d315bd04</meta:generator>
  </office:meta>
</office:document-meta>
</file>