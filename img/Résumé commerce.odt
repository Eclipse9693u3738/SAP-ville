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5c4a" officeooo:paragraph-rsid="000f5c4a"/>
    </style:style>
    <style:style style:name="T1" style:family="text">
      <style:text-properties officeooo:rsid="001003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s commerces sont mis à la disposition des habitants pour qu’ils puissent se fournir en nourriture et en outils <text:span text:style-name="T1">de première qualité dans des magasins avec une architecture hors du commun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5T15:09:04.574083700</meta:creation-date>
    <dc:date>2026-06-15T15:29:48.928778300</dc:date>
    <meta:editing-duration>PT9M24S</meta:editing-duration>
    <meta:editing-cycles>1</meta:editing-cycles>
    <meta:document-statistic meta:table-count="0" meta:image-count="0" meta:object-count="0" meta:page-count="1" meta:paragraph-count="1" meta:word-count="31" meta:character-count="188" meta:non-whitespace-character-count="157"/>
    <meta:generator>LibreOffice/25.8.6.2$Windows_X86_64 LibreOffice_project/b4b39682cd9868fa725bc664aff94278d315bd04</meta:generator>
  </office:meta>
</office:document-meta>
</file>