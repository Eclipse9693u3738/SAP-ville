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e6e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APVILLE</text:span> est assez petite pour que presque tout le monde se connaisse de vue, mais suffisamment diverse pour que chaque rue ait sa propre identité. Les humains tiennent la plupart des commerces, les sylvains entretiennent les jardins communautaires, les nains gèrent les ateliers, les ondins vivent près du lac voisin et les aériens occupent les maisons perchées sur la colline. Les automates et les métamorphes, bien que peu nombreux, sont parfaitement intégrés à la vie loca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4:56:58.280003400</meta:creation-date>
    <dc:date>2026-06-15T15:06:58.651674500</dc:date>
    <meta:editing-duration>PT10M</meta:editing-duration>
    <meta:editing-cycles>1</meta:editing-cycles>
    <meta:document-statistic meta:table-count="0" meta:image-count="0" meta:object-count="0" meta:page-count="1" meta:paragraph-count="1" meta:word-count="76" meta:character-count="479" meta:non-whitespace-character-count="404"/>
    <meta:generator>LibreOffice/25.8.6.2$Windows_X86_64 LibreOffice_project/b4b39682cd9868fa725bc664aff94278d315bd04</meta:generator>
  </office:meta>
</office:document-meta>
</file>