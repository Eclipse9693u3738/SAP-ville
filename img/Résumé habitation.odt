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05e5b" officeooo:paragraph-rsid="00005e5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ette ville possède de nombreuses habitation ( petites et grandes) dotées d’une architecture originale provenant d’une autre planète. Une vingtaine de petites habitations sont disponibles pour accueillir les habitants mais également 10 grandes habitations servant aussi de commerces et d’endroits pour le divertissement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6-15T14:50:17.869429400</meta:creation-date>
    <dc:date>2026-06-15T14:56:49.386199700</dc:date>
    <meta:editing-duration>PT6M32S</meta:editing-duration>
    <meta:editing-cycles>1</meta:editing-cycles>
    <meta:document-statistic meta:table-count="0" meta:image-count="0" meta:object-count="0" meta:page-count="1" meta:paragraph-count="1" meta:word-count="43" meta:character-count="320" meta:non-whitespace-character-count="277"/>
    <meta:generator>LibreOffice/25.8.6.2$Windows_X86_64 LibreOffice_project/b4b39682cd9868fa725bc664aff94278d315bd04</meta:generator>
  </office:meta>
</office:document-meta>
</file>