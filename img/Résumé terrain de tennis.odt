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f57a" officeooo:paragraph-rsid="0009f57a"/>
    </style:style>
    <style:style style:name="T1" style:family="text">
      <style:text-properties officeooo:rsid="000aef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 batiment a été crée par SAPVILLE en raison d’une demande de la par<text:span text:style-name="T1">t</text:span> de la population. Puis cette m<text:span text:style-name="T1">ê</text:span>me population s’est agrandi et la mairie a décidée d’agrandir le nombre de terrains à 10. Mais étant donnée le cout de fabrication d’un terrain de tennis, il a été décidé de réduire la taille de ces terrain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14:17:12.659034500</meta:creation-date>
    <dc:date>2026-06-15T14:24:52.551004500</dc:date>
    <meta:editing-duration>PT7M41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" meta:word-count="57" meta:character-count="311" meta:non-whitespace-character-count="254"/>
  </office:meta>
</office:document-meta>
</file>